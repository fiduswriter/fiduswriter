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dc="http://purl.org/dc/elements/1.1/" xmlns:meta="urn:oasis:names:tc:opendocument:xmlns:meta:1.0" xmlns:table="urn:oasis:names:tc:opendocument:xmlns:table:1.0" xmlns:draw="urn:oasis:names:tc:opendocument:xmlns:drawing:1.0" xmlns:xlink="http://www.w3.org/1999/xlink" xmlns:svg="urn:oasis:names:tc:opendocument:xmlns:svg-compatible:1.0" office:version="1.2">
  <office:scripts/>
  <office:font-face-decls>
    <style:font-face style:name="Courier New" svg:font-family="Courier New"/>
  </office:font-face-decls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text-underline-type="single"/>
    </style:style>
    <style:style style:name="T4" style:family="text">
      <style:text-properties fo:font-family="Courier New" fo:font-size="10pt"/>
    </style:style>
    <style:style style:name="T5" style:family="text">
      <style:text-properties style:text-position="super 58%"/>
    </style:style>
    <style:style style:name="T6" style:family="text">
      <style:text-properties style:text-position="sub 58%"/>
    </style:style>
    <style:style style:name="P1" style:family="paragraph" style:parent-style-name="Standard">
      <style:paragraph-properties fo:text-align="center"/>
    </style:style>
    <style:style style:name="P2" style:family="paragraph" style:parent-style-name="Standard">
      <style:paragraph-properties fo:text-align="end"/>
    </style:style>
  </office:automatic-styles>
  <office:body>
    <office:text>
      <text:h text:outline-level="1">Test Document: Fidus Writer Import (ODT)</text:h>
      <text:h text:outline-level="2">Text Formatting</text:h>
      <text:p>Normal paragraph with
    <text:span text:style-name="T1">bold</text:span>,
    <text:span text:style-name="T2">italic</text:span>,
    <text:span text:style-name="T3">underlined</text:span>,
    <text:span text:style-name="T4">monospace code</text:span>,
    <text:span text:style-name="T5">superscript</text:span>, and
    <text:span text:style-name="T6">subscript</text:span> text.
  </text:p>
      <text:p text:style-name="P1">Center-aligned paragraph</text:p>
      <text:p text:style-name="P2">Right-aligned paragraph</text:p>
      <text:h text:outline-level="2">Lists</text:h>
      <text:list>
        <text:list-item>
          <text:p>Bullet item 1</text:p>
        </text:list-item>
        <text:list-item>
          <text:p>Bullet item 2</text:p>
        </text:list-item>
        <text:list-item>
          <text:p>Bullet item 3</text:p>
        </text:list-item>
      </text:list>
      <text:list text:style-name="L1">
        <text:list-item>
          <text:p>Numbered item 1</text:p>
        </text:list-item>
        <text:list-item>
          <text:p>Numbered item 2</text:p>
        </text:list-item>
        <text:list-item>
          <text:p>Numbered item 3</text:p>
        </text:list-item>
      </text:list>
      <text:h text:outline-level="2">Hyperlinks</text:h>
      <text:p>Visit <text:a xlink:type="simple" xlink:href="https://fiduswriter.org">Fidus Writer</text:a></text:p>
      <text:h text:outline-level="2">Tables</text:h>
      <table:table table:name="Table1">
        <table:table-column table:number-columns-repeated="3"/>
        <table:table-row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>
          <table:table-cell table:number-columns-spanned="3" office:value-type="string">
            <text:p>Merged cell</text:p>
          </table:table-cell>
        </table:table-row>
      </table:table>
      <text:h text:outline-level="2">Footnotes</text:h>
      <text:p>Paragraph with a
    <text:note text:id="ftn1" text:note-class="footnote">
      <text:note-citation>1</text:note-citation>
      <text:note-body><text:p>ODT footnote content.</text:p></text:note-body>
    </text:note>
    footnote.
  </text:p>
      <text:h text:outline-level="2">Block Quote</text:h>
      <text:p>This is a quoted paragraph for testing.</text:p>
      <text:h text:outline-level="2">Tracked Changes</text:h>
      <text:p>Original text with <text:span text:style-name="T1">formatting</text:span>.</text:p>
      <text:h text:outline-level="2">Comments</text:h>
      <text:p>This paragraph has a commented word in it.</text:p>
      <text:h text:outline-level="2">Citations</text:h>
      <text:p>Paragraph with a <text:reference-mark-start text:name="ZOTERO_ITEM CSL_CITATION {&quot;citationID&quot;: &quot;Doe2012&quot;, &quot;properties&quot;: {&quot;formattedCitation&quot;: &quot;(Doe, 2012)&quot;, &quot;plainCitation&quot;: &quot;(Doe, 2012)&quot;, &quot;noteIndex&quot;: 0}, &quot;citationItems&quot;: [{&quot;id&quot;: &quot;Doe2012&quot;, &quot;uris&quot;: [&quot;http://zotero.org/items/Doe2012&quot;], &quot;itemData&quot;: {&quot;title&quot;: &quot;My title&quot;, &quot;author&quot;: [{&quot;family&quot;: &quot;Doe&quot;, &quot;given&quot;: &quot;John&quot;}], &quot;date&quot;: &quot;2012&quot;}}] RNDjURflxg9F1"/>citation (Doe, 2012)<text:reference-mark-end text:name="ZOTERO_ITEM CSL_CITATION {&quot;citationID&quot;: &quot;Doe2012&quot;, &quot;properties&quot;: {&quot;formattedCitation&quot;: &quot;(Doe, 2012)&quot;, &quot;plainCitation&quot;: &quot;(Doe, 2012)&quot;, &quot;noteIndex&quot;: 0}, &quot;citationItems&quot;: [{&quot;id&quot;: &quot;Doe2012&quot;, &quot;uris&quot;: [&quot;http://zotero.org/items/Doe2012&quot;], &quot;itemData&quot;: {&quot;title&quot;: &quot;My title&quot;, &quot;author&quot;: [{&quot;family&quot;: &quot;Doe&quot;, &quot;given&quot;: &quot;John&quot;}], &quot;date&quot;: &quot;2012&quot;}}] RNDjURflxg9F1"/> in the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>
      <style:text-properties fo:font-size="11pt"/>
    </style:style>
    <style:style style:name="Heading" style:family="paragraph">
      <style:text-properties fo:font-size="14pt" fo:font-weight="bold"/>
    </style:style>
  </office:styles>
  <office:automatic-styles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</office:automatic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title>Comprehensive Test Document for Fidus Writer Import (ODT)</dc:title>
    <dc:creator>Jane Doe</dc:creator>
    <dc:subject>testing, import, fiduswriter, odt</dc:subject>
    <dc:language>en-US</dc:language>
    <meta:creation-date>2024-01-01T00:00:00</meta:creation-date>
  </office:meta>
</office:document-meta>
</file>